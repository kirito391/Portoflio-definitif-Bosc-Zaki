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0f6c9" officeooo:paragraph-rsid="0020f6c9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20f6c9" officeooo:paragraph-rsid="0020f6c9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>
      <style:text-properties officeooo:paragraph-rsid="0020f6c9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>
      <style:text-properties officeooo:rsid="0020f6c9" officeooo:paragraph-rsid="0020f6c9"/>
    </style:style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T1" style:family="text">
      <style:text-properties officeooo:rsid="00223bc1"/>
    </style:style>
    <style:style style:name="T2" style:family="text">
      <style:text-properties officeooo:rsid="0020f6c9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📝 Compte rendu – Simulation de cyberattaque</text:h>
      <text:p text:style-name="Text_20_body"><text:span text:style-name="Strong_20_Emphasis">Rôle : Équipe GLPI</text:span></text:p>
      <text:p text:style-name="P2"/>
      <text:h text:style-name="P3" text:outline-level="2">Présentation de la situation</text:h>
      <text:p text:style-name="Text_20_body">Le 08/10/2025, la mairie de Villefranche subit une cyberattaque qui impacte surtout le service social.</text:p>
      <text:p text:style-name="Text_20_body">Les premiers signes viennent d’utilisateurs qui ne peuvent plus ouvrir leurs fichiers (.locked). Ça bloque directement leur travail.</text:p>
      <text:p text:style-name="Text_20_body">En parallèle, une alerte signale des tentatives de connexion suspectes, et un mail de phishing est retrouvé côté comptabilité.</text:p>
      <text:p text:style-name="Text_20_body">En plus de ça, une rumeur externe parle d’une fuite de données, ce qui aggrave la situation.</text:p>
      <text:p text:style-name="P2"/>
      <text:h text:style-name="P3" text:outline-level="2">Description de l’attaque</text:h>
      <text:p text:style-name="Text_20_body">L’attaque commence probablement par un phishing (fausse facture). <text:span text:style-name="T1">Puis vient divers problèmes touchant différents services tel que : RH innacesible ; Portail citoyen instable ; GED indisponible ; Messagerie ralentie</text:span></text:p>
      <text:p text:style-name="Text_20_body">Après ça, l’attaquant a réussi à accéder au système et a tenté de se déplacer (tentatives de connexion).</text:p>
      <text:p text:style-name="Text_20_body">Ensuite, les fichiers sont chiffrés → typique d’un rançongiciel.</text:p>
      <text:p text:style-name="Text_20_body">Les risques sont importants :</text:p>
      <text:list text:style-name="L1">
        <text:list-item>
          <text:p text:style-name="P4">perte de données </text:p>
        </text:list-item>
        <text:list-item>
          <text:p text:style-name="P4">services bloqués </text:p>
        </text:list-item>
        <text:list-item>
          <text:p text:style-name="P5">fuites de données</text:p>
        </text:list-item>
        <text:list-item>
          <text:p text:style-name="P6">possible vol de données </text:p>
        </text:list-item>
      </text:list>
      <text:p text:style-name="P7"/>
      <text:p text:style-name="Text_20_body">Le fait qu’une rumeur circule laisse penser que des données ont peut-être été récupérées avant le chiffrement.</text:p>
      <text:p text:style-name="P2"/>
      <text:h text:style-name="P3" text:outline-level="2">Actions mises en œuvre</text:h>
      <text:p text:style-name="Text_20_body">En tant qu’équipe GLPI, notre rôle était de tout centraliser.</text:p>
      <text:p text:style-name="Text_20_body">On a créé et organisé les tickets pour chaque problème (fichiers, alertes, mails suspects).</text:p>
      <text:p text:style-name="Text_20_body">On a aussi récupéré les preuves :</text:p>
      <text:list text:style-name="L2">
        <text:list-item>
          <text:p text:style-name="P8">captures d’écran </text:p>
        </text:list-item>
        <text:list-item>
          <text:p text:style-name="P8"><text:soft-page-break/>logs </text:p>
        </text:list-item>
        <text:list-item>
          <text:p text:style-name="P9">mails </text:p>
        </text:list-item>
      </text:list>
      <text:p text:style-name="Text_20_body">Ensuite, on a priorisé :</text:p>
      <text:list text:style-name="L3">
        <text:list-item>
          <text:p text:style-name="P10">critique → serveurs et services bloqués </text:p>
        </text:list-item>
        <text:list-item>
          <text:p text:style-name="P10">important → comptes suspects </text:p>
        </text:list-item>
        <text:list-item>
          <text:p text:style-name="P11">normal → signalements utilisateurs </text:p>
        </text:list-item>
      </text:list>
      <text:p text:style-name="Text_20_body">Enfin, on a transmis les infos au <text:span text:style-name="T2">Responsable SI pour localiser l’origine technique de l’incident, qu’il puisse décider <text:s/>des mesures de confinement, coordonner les équipes technique et qu’il informe la direction</text:span></text:p>
      <text:p text:style-name="P2"/>
      <text:h text:style-name="P3" text:outline-level="2">Gestion de la crise</text:h>
      <text:p text:style-name="P12">Il a fallu créer les tickets et faire des rapports détaillés pour que le Responsable SI puisse trouver l’origine de cet incident, <text:span text:style-name="Strong_20_Emphasis"><text:span text:style-name="T3">tout en centralisant les informations, en priorisant les incidents selon leur gravité et en assurant une communication claire entre les différentes équipes afin de réagir rapidement et efficacement.</text:span></text:span> </text:p>
      <text:p text:style-name="P2"/>
      <text:h text:style-name="P3" text:outline-level="2">Restauration des services</text:h>
      <text:p text:style-name="Text_20_body">Les services ont été restaurés avec des sauvegardes saines.</text:p>
      <text:p text:style-name="Text_20_body">Les données ont été vérifiées avant remise en service, puis les systèmes ont été relancés progressivement.</text:p>
      <text:p text:style-name="Text_20_body">Tout a été documenté dans GLPI pour garder une trace.</text:p>
      <text:p text:style-name="P2"/>
      <text:h text:style-name="P3" text:outline-level="2">Retour d’expérience (RETEX)</text:h>
      <text:p text:style-name="Text_20_body">Points positifs :</text:p>
      <text:list text:style-name="L4">
        <text:list-item>
          <text:p text:style-name="P13">bonne organisation avec GLPI </text:p>
        </text:list-item>
        <text:list-item>
          <text:p text:style-name="P13">infos centralisées </text:p>
        </text:list-item>
        <text:list-item>
          <text:p text:style-name="P14">bonne réactivité </text:p>
        </text:list-item>
      </text:list>
      <text:p text:style-name="Text_20_body">Points à améliorer :</text:p>
      <text:list text:style-name="L5">
        <text:list-item>
          <text:p text:style-name="P15">détection trop tardive </text:p>
        </text:list-item>
        <text:list-item>
          <text:p text:style-name="P15">manque de sensibilisation au phishing </text:p>
        </text:list-item>
        <text:list-item>
          <text:p text:style-name="P16">problème de communication entre les équipes</text:p>
        </text:list-item>
      </text:list>
      <text:p text:style-name="Text_20_body">Améliorations possibles :</text:p>
      <text:list text:style-name="L6">
        <text:list-item>
          <text:p text:style-name="P17">formation/<text:span text:style-name="T2">sensibilisation </text:span>des utilisateurs </text:p>
        </text:list-item>
        <text:list-item>
          <text:p text:style-name="P17">meilleure surveillance </text:p>
        </text:list-item>
        <text:list-item>
          <text:p text:style-name="P17">MFA et sécurité renforcée </text:p>
        </text:list-item>
        <text:list-item>
          <text:p text:style-name="P18">plan de gestion de crise clair </text:p>
        </text:list-item>
      </text:list>
      <text:p text:style-name="P2"/>
      <text:h text:style-name="P3" text:outline-level="2"><text:soft-page-break/>Conclusion</text:h>
      <text:p text:style-name="Text_20_body">Cette simulation montre qu’une cyberattaque ne touche pas que les machines, mais toute l’organisation.</text:p>
      <text:p text:style-name="P7">Le rôle de GLPI <text:span text:style-name="T1">dans ce scénario m’a permit de comprendre comment hiérarchiser les incident, de créer les tickets avec des preuves (capture d’écran/mail), cela m’a aussi aider a collecter les preuves avec rigueur car c’est une étape nécessaire dans la résolution des incident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4:18:21.589796700</meta:creation-date>
    <dc:date>2026-05-06T15:51:23.551605600</dc:date>
    <meta:editing-duration>PT29M16S</meta:editing-duration>
    <meta:editing-cycles>1</meta:editing-cycles>
    <meta:document-statistic meta:table-count="0" meta:image-count="0" meta:object-count="0" meta:page-count="3" meta:paragraph-count="52" meta:word-count="487" meta:character-count="3116" meta:non-whitespace-character-count="2680"/>
    <meta:generator>LibreOffice/25.8.5.2$Windows_X86_64 LibreOffice_project/9c8b85f387cc00a89945a79c9e6239f32e450ac2</meta:generator>
  </office:meta>
</office:document-meta>
</file>