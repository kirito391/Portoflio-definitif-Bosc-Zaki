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BF30D5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>
      <style:text-properties style:font-name="Open Sans"/>
    </style:style>
    <style:style style:name="P4" style:family="paragraph" style:parent-style-name="Horizontal_20_Line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>
      <style:text-properties style:font-name="Open Sans"/>
    </style:style>
    <style:style style:name="P6" style:family="paragraph" style:parent-style-name="Text_20_body" style:list-style-name="L2">
      <style:text-properties style:font-name="Open Sans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Open Sans"/>
    </style:style>
    <style:style style:name="P9" style:family="paragraph" style:parent-style-name="Text_20_body" style:list-style-name="L5">
      <style:text-properties style:font-name="Open Sans"/>
    </style:style>
    <style:style style:name="P10" style:family="paragraph" style:parent-style-name="Heading_20_2">
      <style:paragraph-properties fo:margin-top="0cm" fo:margin-bottom="0.247cm" style:contextual-spacing="false" fo:line-height="115%"/>
    </style:style>
    <style:style style:name="P11" style:family="paragraph" style:parent-style-name="Heading_20_3">
      <style:paragraph-properties fo:margin-top="0cm" fo:margin-bottom="0.247cm" style:contextual-spacing="false" fo:line-height="115%"/>
      <style:text-properties fo:color="#2ba9a0" loext:opacity="100%" style:font-name="Montserrat"/>
    </style:style>
    <style:style style:name="P12" style:family="paragraph" style:parent-style-name="Text_20_body" style:list-style-name="L6">
      <style:text-properties style:font-name="Open Sans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style:font-name="Open Sans"/>
    </style:style>
    <style:style style:name="P14" style:family="paragraph" style:parent-style-name="Text_20_body" style:list-style-name="L7">
      <style:text-properties style:font-name="Open Sans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text-properties style:font-name="Open Sans"/>
    </style:style>
    <style:style style:name="P17" style:family="paragraph" style:parent-style-name="Text_20_body" style:list-style-name="L9">
      <style:text-properties style:font-name="Open Sans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Standard">
      <style:paragraph-properties fo:text-align="end" style:justify-single-word="false"/>
      <style:text-properties officeooo:paragraph-rsid="00078514"/>
    </style:style>
    <style:style style:name="T1" style:family="text">
      <style:text-properties fo:color="#0b1f3a" loext:opacity="100%" style:font-name="Montserrat" fo:font-size="16pt" style:font-size-asian="16pt" style:font-size-complex="16pt"/>
    </style:style>
    <style:style style:name="T2" style:family="text">
      <style:text-properties fo:color="#2ba9a0" loext:opacity="100%"/>
    </style:style>
    <style:style style:name="T3" style:family="text">
      <style:text-properties fo:color="#2ba9a0" loext:opacity="100%" style:font-name="Montserrat"/>
    </style:style>
    <style:style style:name="T4" style:family="text">
      <style:text-properties style:font-name="Ope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-1.341cm" svg:y="-0.529cm" svg:width="3.852cm" svg:height="3.852cm" draw:z-index="0"><draw:image xlink:href="Pictures/100000000000040000000400BF30D5D5.png" xlink:type="simple" xlink:show="embed" xlink:actuate="onLoad" draw:mime-type="image/png"/></draw:frame><text:s text:c="6"/><text:span text:style-name="T1">🌍 Fiche explicative – Rôle du Système d’Information (SI) et ses composantes</text:span></text:h>
      <text:h text:style-name="P2" text:outline-level="3">Objectif</text:h>
      <text:p text:style-name="P3">Expliquer à un nouvel arrivant le rôle du Système d’Information (SI) au sein de GlobeXplorer et présenter ses principales composantes.</text:p>
      <text:p text:style-name="P4"/>
      <text:h text:style-name="P2" text:outline-level="3"><text:span text:style-name="T2">1.</text:span> <text:span text:style-name="T3">Qu’est-ce qu’un Système d’Information ?</text:span></text:h>
      <text:p text:style-name="P3">Le Système d’Information (SI) regroupe l’ensemble des ressources humaines, matérielles et logicielles qui permettent à GlobeXplorer :</text:p>
      <text:list text:style-name="L1">
        <text:list-item>
          <text:p text:style-name="P5">Collecter, traiter, stocker et diffuser l’information</text:p>
        </text:list-item>
        <text:list-item>
          <text:p text:style-name="P5">Faciliter la communication interne entre les équipes</text:p>
        </text:list-item>
        <text:list-item>
          <text:p text:style-name="P5">Garantir la sécurité et la disponibilité des données clients</text:p>
        </text:list-item>
      </text:list>
      <text:p text:style-name="P4"/>
      <text:h text:style-name="P2" text:outline-level="3"><text:span text:style-name="T2">2. </text:span><text:span text:style-name="T3">Rôle du SI dans l’agence GlobeXplorer</text:span></text:h>
      <text:p text:style-name="P3">Le SI soutient toutes les activités de l’agence :</text:p>
      <text:list text:style-name="L2">
        <text:list-item>
          <text:p text:style-name="P6">Gestion des clients et des réservations via l’application métier Odoo</text:p>
        </text:list-item>
        <text:list-item>
          <text:p text:style-name="P6">Partage documentaire sécurisé sur le réseau interne</text:p>
        </text:list-item>
        <text:list-item>
          <text:p text:style-name="P6">Suivi des ventes et statistiques pour les responsables</text:p>
        </text:list-item>
        <text:list-item>
          <text:p text:style-name="P6">Gestion des droits d’accès pour assurer la confidentialité des données</text:p>
        </text:list-item>
        <text:list-item>
          <text:p text:style-name="P6">Soutien à la prise de décision grâce à la centralisation des informations</text:p>
        </text:list-item>
      </text:list>
      <text:p text:style-name="P4"/>
      <text:h text:style-name="P2" text:outline-level="3"><text:span text:style-name="T2">3. </text:span><text:span text:style-name="T3">Les composantes du SI</text:span></text:h>
      <text:list text:style-name="L3">
        <text:list-item>
          <text:p text:style-name="P7"><text:span text:style-name="Strong_20_Emphasis"><text:span text:style-name="T4">Matériel</text:span></text:span><text:span text:style-name="T4"> : Postes informatiques, serveurs, scanners, imprimantes</text:span></text:p>
        </text:list-item>
        <text:list-item>
          <text:p text:style-name="P7"><text:span text:style-name="Strong_20_Emphasis"><text:span text:style-name="T4">Logiciel</text:span></text:span><text:span text:style-name="T4"> : Odoo (gestion clients), Access (base documentaire), suite Office</text:span></text:p>
        </text:list-item>
        <text:list-item>
          <text:p text:style-name="P7"><text:span text:style-name="Strong_20_Emphasis"><text:span text:style-name="T4">Données</text:span></text:span><text:span text:style-name="T4"> : Fiches clients, contrats, documents numérisés</text:span></text:p>
        </text:list-item>
        <text:list-item>
          <text:p text:style-name="P7"><text:span text:style-name="Strong_20_Emphasis"><text:span text:style-name="T4">Procédures</text:span></text:span><text:span text:style-name="T4"> : Sauvegardes, classement, règles d’accès</text:span></text:p>
        </text:list-item>
        <text:list-item>
          <text:p text:style-name="P7"><text:span text:style-name="Strong_20_Emphasis"><text:span text:style-name="T4">Utilisateurs</text:span></text:span><text:span text:style-name="T4"> : Collaborateurs, techniciens SI, direction</text:span></text:p>
        </text:list-item>
      </text:list>
      <text:p text:style-name="P4"/>
      <text:h text:style-name="P2" text:outline-level="3"><text:span text:style-name="T2">4. </text:span><text:span text:style-name="T3">Bonnes pratiques</text:span></text:h>
      <text:list text:style-name="L4">
        <text:list-item>
          <text:p text:style-name="P8">Se connecter uniquement avec son compte personnel</text:p>
        </text:list-item>
        <text:list-item>
          <text:p text:style-name="P8">Sauvegarder régulièrement les documents sur le réseau</text:p>
        </text:list-item>
        <text:list-item>
          <text:p text:style-name="P8">Respecter les droits d’accès attribués</text:p>
        </text:list-item>
        <text:list-item>
          <text:p text:style-name="P8"><text:soft-page-break/>Prévenir le service SI en cas d’anomalie</text:p>
        </text:list-item>
      </text:list>
      <text:p text:style-name="P4"/>
      <text:h text:style-name="P2" text:outline-level="3"><text:span text:style-name="T2">5. </text:span><text:span text:style-name="T3">Résultat attendu</text:span></text:h>
      <text:p text:style-name="P3">Chaque collaborateur doit :</text:p>
      <text:list text:style-name="L5">
        <text:list-item>
          <text:p text:style-name="P9">Comprendre le fonctionnement du SI</text:p>
        </text:list-item>
        <text:list-item>
          <text:p text:style-name="P9">Savoir où et comment accéder aux outils métiers</text:p>
        </text:list-item>
        <text:list-item>
          <text:p text:style-name="P9">Appliquer les règles de sécurité de l’information</text:p>
        </text:list-item>
      </text:list>
      <text:p text:style-name="P4"/>
      <text:h text:style-name="P10" text:outline-level="2">🧾 Procédure – Numériser, nommer, classer et interroger un document dans Access</text:h>
      <text:h text:style-name="P11" text:outline-level="3">Objectif</text:h>
      <text:p text:style-name="P3">Cette procédure explique comment numériser un document papier, le nommer correctement, le classer dans la base Access et le retrouver ensuite.</text:p>
      <text:p text:style-name="P4"/>
      <text:h text:style-name="P11" text:outline-level="3">Prérequis</text:h>
      <text:list text:style-name="L6">
        <text:list-item>
          <text:p text:style-name="P12">Un poste connecté au réseau GlobeXplorer</text:p>
        </text:list-item>
        <text:list-item>
          <text:p text:style-name="P12">Un scanner relié à l’ordinateur</text:p>
        </text:list-item>
        <text:list-item>
          <text:p text:style-name="P12">Le logiciel Access – Base documentaire GlobeXplorer</text:p>
        </text:list-item>
        <text:list-item>
          <text:p text:style-name="P12">Compte utilisateur actif</text:p>
        </text:list-item>
      </text:list>
      <text:p text:style-name="P13"/>
      <text:h text:style-name="P11" text:outline-level="3">Étapes de la procédure</text:h>
      <text:list text:style-name="L7">
        <text:list-item>
          <text:p text:style-name="P14">Allumer le scanner et ouvrir le logiciel de numérisation</text:p>
        </text:list-item>
        <text:list-item>
          <text:p text:style-name="P14">Placer le document à numériser sur le plateau du scanner</text:p>
        </text:list-item>
        <text:list-item>
          <text:p text:style-name="P14">Sélectionner le format PDF et la résolution 300 dpi</text:p>
        </text:list-item>
        <text:list-item>
          <text:p text:style-name="P15"><text:span text:style-name="T4">Cliquer sur </text:span><text:span text:style-name="Strong_20_Emphasis"><text:span text:style-name="T4">Numériser</text:span></text:span><text:span text:style-name="T4"> puis </text:span><text:span text:style-name="Strong_20_Emphasis"><text:span text:style-name="T4">Enregistrer sous</text:span></text:span></text:p>
        </text:list-item>
        <text:list-item>
          <text:p text:style-name="P15"><text:span text:style-name="T4">Nommer le fichier selon la convention : </text:span><text:span text:style-name="Source_20_Text"><text:span text:style-name="T4">Type_Document_NomClient_Date.pdf</text:span></text:span><text:span text:style-name="T4"><text:line-break/></text:span><text:span text:style-name="Emphasis"><text:span text:style-name="T4">(Exemple : Contrat_Tourisme_Durand_2025-10-13.pdf)</text:span></text:span></text:p>
        </text:list-item>
        <text:list-item>
          <text:p text:style-name="P14">Ouvrir Access &gt; Base documentaire GlobeXplorer</text:p>
        </text:list-item>
        <text:list-item>
          <text:p text:style-name="P15"><text:span text:style-name="T4">Cliquer sur </text:span><text:span text:style-name="Strong_20_Emphasis"><text:span text:style-name="T4">Ajouter un document</text:span></text:span><text:span text:style-name="T4"> puis </text:span><text:span text:style-name="Strong_20_Emphasis"><text:span text:style-name="T4">Importer un fichier</text:span></text:span></text:p>
        </text:list-item>
        <text:list-item>
          <text:p text:style-name="P14">Renseigner les champs (type, date, auteur, service)</text:p>
        </text:list-item>
        <text:list-item>
          <text:p text:style-name="P15"><text:span text:style-name="T4">Cliquer sur </text:span><text:span text:style-name="Strong_20_Emphasis"><text:span text:style-name="T4">Valider</text:span></text:span><text:span text:style-name="T4"> pour enregistrer</text:span></text:p>
        </text:list-item>
        <text:list-item>
          <text:p text:style-name="P15"><text:span text:style-name="T4">Pour rechercher un document : ouvrir Access → cliquer sur </text:span><text:span text:style-name="Strong_20_Emphasis"><text:span text:style-name="T4">Rechercher</text:span></text:span><text:span text:style-name="T4"> → entrer un mot-clé (nom client, type de document, date)</text:span></text:p>
        </text:list-item>
      </text:list>
      <text:p text:style-name="P4"><text:soft-page-break/></text:p>
      <text:h text:style-name="P11" text:outline-level="3">Résultat attendu</text:h>
      <text:list text:style-name="L8">
        <text:list-item>
          <text:p text:style-name="P16">Le document est correctement enregistré et accessible à tous les collaborateurs autorisés</text:p>
        </text:list-item>
        <text:list-item>
          <text:p text:style-name="P16">Il peut être retrouvé via la recherche Access par nom, type ou date</text:p>
        </text:list-item>
      </text:list>
      <text:p text:style-name="P13"/>
      <text:h text:style-name="P11" text:outline-level="3">Dépannage – Erreurs fréquentes</text:h>
      <text:list text:style-name="L9">
        <text:list-item>
          <text:p text:style-name="P17">Si le scanner ne répond pas : vérifier le câble USB ou redémarrer le logiciel</text:p>
        </text:list-item>
        <text:list-item>
          <text:p text:style-name="P17">Si Access affiche une erreur d’import : vérifier que le fichier n’est pas ouvert ailleurs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2:23:08.977327700</meta:creation-date>
    <dc:date>2025-10-13T22:57:29.808444700</dc:date>
    <meta:editing-duration>PT4M19S</meta:editing-duration>
    <meta:editing-cycles>1</meta:editing-cycles>
    <meta:document-statistic meta:table-count="0" meta:image-count="1" meta:object-count="0" meta:page-count="3" meta:paragraph-count="56" meta:word-count="486" meta:character-count="3158" meta:non-whitespace-character-count="2756"/>
    <meta:generator>LibreOffice/25.8.1.1$Windows_X86_64 LibreOffice_project/54047653041915e595ad4e45cccea684809c77b5</meta:generator>
  </office:meta>
</office:document-meta>
</file>